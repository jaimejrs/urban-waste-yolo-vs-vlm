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ela1" style:family="table">
      <style:table-properties style:width="10.059cm" table:align="left"/>
    </style:style>
    <style:style style:name="Tabela1.A" style:family="table-column">
      <style:table-column-properties style:column-width="2.805cm"/>
    </style:style>
    <style:style style:name="Tabela1.B" style:family="table-column">
      <style:table-column-properties style:column-width="1.139cm"/>
    </style:style>
    <style:style style:name="Tabela1.C" style:family="table-column">
      <style:table-column-properties style:column-width="1.787cm"/>
    </style:style>
    <style:style style:name="Tabela1.D" style:family="table-column">
      <style:table-column-properties style:column-width="4.329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4.71cm"/>
    </style:style>
    <style:style style:name="Tabela2.B" style:family="table-column">
      <style:table-column-properties style:column-width="5.281cm"/>
    </style:style>
    <style:style style:name="Tabela2.C" style:family="table-column">
      <style:table-column-properties style:column-width="7.01cm"/>
    </style:style>
    <style:style style:name="Tabela2.A1" style:family="table-cell">
      <style:table-cell-properties style:vertical-align="middle" fo:padding="0.049cm" fo:border="none"/>
    </style:style>
    <style:style style:name="Tabela3" style:family="table">
      <style:table-properties style:width="12.021cm" table:align="left"/>
    </style:style>
    <style:style style:name="Tabela3.A" style:family="table-column">
      <style:table-column-properties style:column-width="4.265cm"/>
    </style:style>
    <style:style style:name="Tabela3.B" style:family="table-column">
      <style:table-column-properties style:column-width="2.397cm"/>
    </style:style>
    <style:style style:name="Tabela3.C" style:family="table-column">
      <style:table-column-properties style:column-width="3.337cm"/>
    </style:style>
    <style:style style:name="Tabela3.D" style:family="table-column">
      <style:table-column-properties style:column-width="2.021cm"/>
    </style:style>
    <style:style style:name="Tabela3.A1" style:family="table-cell">
      <style:table-cell-properties style:vertical-align="middle" fo:padding="0.049cm" fo:border="none"/>
    </style:style>
    <style:style style:name="Tabela4" style:family="table">
      <style:table-properties style:width="6.403cm" table:align="left"/>
    </style:style>
    <style:style style:name="Tabela4.A" style:family="table-column">
      <style:table-column-properties style:column-width="3.224cm"/>
    </style:style>
    <style:style style:name="Tabela4.B" style:family="table-column">
      <style:table-column-properties style:column-width="0.822cm"/>
    </style:style>
    <style:style style:name="Tabela4.D" style:family="table-column">
      <style:table-column-properties style:column-width="0.704cm"/>
    </style:style>
    <style:style style:name="Tabela4.E" style:family="table-column">
      <style:table-column-properties style:column-width="0.831cm"/>
    </style:style>
    <style:style style:name="Tabela4.A1" style:family="table-cell">
      <style:table-cell-properties style:vertical-align="middle" fo:padding="0.049cm" fo:border="none"/>
    </style:style>
    <style:style style:name="Tabela5" style:family="table">
      <style:table-properties style:width="13.19cm" table:align="left"/>
    </style:style>
    <style:style style:name="Tabela5.A" style:family="table-column">
      <style:table-column-properties style:column-width="1.483cm"/>
    </style:style>
    <style:style style:name="Tabela5.B" style:family="table-column">
      <style:table-column-properties style:column-width="1.833cm"/>
    </style:style>
    <style:style style:name="Tabela5.C" style:family="table-column">
      <style:table-column-properties style:column-width="1.707cm"/>
    </style:style>
    <style:style style:name="Tabela5.D" style:family="table-column">
      <style:table-column-properties style:column-width="2.588cm"/>
    </style:style>
    <style:style style:name="Tabela5.E" style:family="table-column">
      <style:table-column-properties style:column-width="2.798cm"/>
    </style:style>
    <style:style style:name="Tabela5.F" style:family="table-column">
      <style:table-column-properties style:column-width="1.351cm"/>
    </style:style>
    <style:style style:name="Tabela5.G" style:family="table-column">
      <style:table-column-properties style:column-width="1.431cm"/>
    </style:style>
    <style:style style:name="Tabela5.A1" style:family="table-cell">
      <style:table-cell-properties style:vertical-align="middle" fo:padding="0.049cm" fo:border="none"/>
    </style:style>
    <style:style style:name="Tabela6" style:family="table">
      <style:table-properties style:width="8.832cm" table:align="left"/>
    </style:style>
    <style:style style:name="Tabela6.A" style:family="table-column">
      <style:table-column-properties style:column-width="2.81cm"/>
    </style:style>
    <style:style style:name="Tabela6.B" style:family="table-column">
      <style:table-column-properties style:column-width="2.605cm"/>
    </style:style>
    <style:style style:name="Tabela6.C" style:family="table-column">
      <style:table-column-properties style:column-width="3.417cm"/>
    </style:style>
    <style:style style:name="Tabela6.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5.62cm"/>
    </style:style>
    <style:style style:name="Tabela7.B" style:family="table-column">
      <style:table-column-properties style:column-width="3.985cm"/>
    </style:style>
    <style:style style:name="Tabela7.C" style:family="table-column">
      <style:table-column-properties style:column-width="7.396cm"/>
    </style:style>
    <style:style style:name="Tabela7.A1" style:family="table-cell">
      <style:table-cell-properties style:vertical-align="middle" fo:padding="0.049cm" fo:border="none"/>
    </style:style>
    <style:style style:name="P1" style:family="paragraph" style:parent-style-name="Table_20_Contents">
      <style:paragraph-properties fo:text-align="end" style:justify-single-word="false"/>
    </style:style>
    <style:style style:name="P2" style:family="paragraph" style:parent-style-name="Table_20_Heading">
      <style:paragraph-properties fo:text-align="end" style:justify-single-word="false"/>
    </style:style>
    <style:style style:name="T1" style:family="text">
      <style:text-properties officeooo:rsid="0018c9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ialized Detector or Vision-Language Model? Evaluating YOLOv11m and Gemma 3 27B-IT for Urban Waste Monitoring</text:h>
      <text:p text:style-name="Text_20_body"><text:span text:style-name="Strong_20_Emphasis">Jaime Teixeira de Araújo Júnior¹, Carlos de Oliveira Caminha Neto¹</text:span></text:p>
      <text:p text:style-name="Text_20_body">¹Universidade Federal do Ceará — Fortaleza, CE — Brasil<text:line-break/><text:span text:style-name="Strong_20_Emphasis">E-mails:</text:span> <text:a xlink:type="simple" xlink:href="mailto:jaime@gmail.com" text:style-name="Internet_20_link" text:visited-style-name="Visited_20_Internet_20_Link"><text:span text:style-name="T1">jaime@gmail.com</text:span></text:a><text:span text:style-name="T1">, caminha@gmail.com</text:span></text:p>
      <text:h text:style-name="Heading_20_2" text:outline-level="2">Abstract</text:h>
      <text:p text:style-name="Text_20_body">Urban waste monitoring on public roads is a relevant challenge for municipal management because it requires large-scale inspection under limited operational resources. This study evaluates two distinct artificial intelligence strategies for identifying visible waste in real images of Brazilian streets: YOLOv11m, fine-tuned as a specialized object detector, and Gemma 3 27B-IT, employed as a zero-shot vision-language model. YOLOv11m was trained with 6,736 images, including 15.6% background samples, while both models were evaluated on an external and balanced test set containing 560 Brazilian street images. Predictive performance, error profiles, statistical significance, latency, and throughput were analyzed. Gemma 3 27B-IT achieved higher accuracy, recall, specificity, and F1-score, obtaining an F1-score of 0.9238 against 0.7040 for YOLOv11m. The difference was statistically significant according to McNemar’s test. Conversely, YOLOv11m processed approximately 119 images per second and presented an average latency 141.9 times lower than the vision-language model. The findings reveal a clear accuracy–latency trade-off: Gemma is more suitable for targeted analyses that prioritize predictive performance, whereas YOLO is more appropriate for large-scale screening, real-time processing, and applications requiring explicit visual localization. The results also indicate potential for hybrid systems combining fast detection and multimodal confirmation.</text:p>
      <text:p text:style-name="Text_20_body"><text:span text:style-name="Strong_20_Emphasis">Keywords:</text:span> urban waste monitoring; object detection; vision-language models; YOLOv11m; public administration.</text:p>
      <text:p text:style-name="Text_20_body"><text:span text:style-name="Strong_20_Emphasis">CCS Concepts:</text:span> Computing methodologies → Object detection; Computer vision; Machine learning; Applied computing → Environmental sciences; E-government.</text:p>
      <text:p text:style-name="Horizontal_20_Line"/>
      <text:h text:style-name="Heading_20_2" text:outline-level="2">1. Introdução</text:h>
      <text:p text:style-name="Text_20_body">A gestão de resíduos sólidos urbanos envolve impactos ambientais, sanitários, financeiros e operacionais, além de demandar planejamento contínuo dos serviços de limpeza pública. No Brasil, a Política Nacional de Resíduos Sólidos atribui aos municípios papel central na organização da coleta, do manejo e da destinação dos resíduos (Brasil, 2010). Os custos desses serviços também dependem das formas de gestão e da estrutura operacional adotadas por cada município (Rodrigues, Magalhães Filho e Pereira, 2016).</text:p>
      <text:p text:style-name="Text_20_body">A produção de informações territorializadas sobre descarte irregular pode apoiar a priorização de áreas, o planejamento de rotas e a fiscalização. Entretanto, a inspeção manual de grandes volumes <text:soft-page-break/>de imagens demanda tempo e recursos humanos. Técnicas de visão computacional oferecem a possibilidade de transformar registros visuais de ruas em alertas administrativos, mas sua utilidade depende não apenas da acurácia, como também da velocidade, da ocorrência de falsos alarmes, da rastreabilidade e da infraestrutura necessária para operação.</text:p>
      <text:p text:style-name="Text_20_body">Detectores de objetos da família YOLO são orientados à localização rápida de instâncias visuais e retornam caixas delimitadoras que facilitam a auditoria das predições (Redmon et al., 2016; Terven, Córdova-Esparza e Romero-González, 2023). Modelos visão-linguagem, por sua vez, associam imagens e instruções textuais, podendo executar tarefas em regime <text:span text:style-name="Emphasis">zero-shot</text:span>, sem ajuste específico no conjunto-alvo (Radford et al., 2021; Zhang et al., 2024). Essa flexibilidade reduz o esforço inicial de treinamento, mas pode exigir modelos maiores e maior custo de inferência.</text:p>
      <text:p text:style-name="Text_20_body">Estudos anteriores aplicaram redes profundas à detecção de resíduos em ambientes urbanos e naturais (Córdova et al., 2022; Majchrowska et al., 2022). Também surgiram avaliações de modelos visão-linguagem para classificação de resíduos (Funk et al., 2025; Malla, Bazli e Arashpour, 2026). Contudo, permanece limitada a evidência sobre a comparação direta, no mesmo conjunto de imagens brasileiras, entre um detector especializado e um grande modelo visão-linguagem, considerando simultaneamente desempenho preditivo, significância estatística, latência e implicações administrativas.</text:p>
      <text:p text:style-name="Text_20_body">Este trabalho investiga as seguintes perguntas:</text:p>
      <text:p text:style-name="Text_20_body"><text:span text:style-name="Strong_20_Emphasis">RQ1:</text:span> Qual modelo apresenta melhor desempenho na classificação binária da presença de resíduos em imagens reais de vias públicas brasileiras?</text:p>
      <text:p text:style-name="Text_20_body"><text:span text:style-name="Strong_20_Emphasis">RQ2:</text:span> Qual é o trade-off entre desempenho preditivo, eficiência computacional e adequação aos diferentes cenários de monitoramento urbano?</text:p>
      <text:p text:style-name="Text_20_body">As principais contribuições são: uma avaliação controlada em 560 imagens brasileiras externas ao treinamento; a comparação entre um detector ajustado por <text:span text:style-name="Emphasis">fine-tuning</text:span> e um modelo visão-linguagem em regime <text:span text:style-name="Emphasis">zero-shot</text:span>; uma análise estatística pareada das predições; e a caracterização dos cenários em que cada paradigma apresenta maior viabilidade operacional.</text:p>
      <text:p text:style-name="Horizontal_20_Line"/>
      <text:h text:style-name="Heading_20_2" text:outline-level="2">2. Trabalhos Relacionados</text:h>
      <text:h text:style-name="Heading_20_3" text:outline-level="3">2.1 Detecção automatizada de resíduos</text:h>
      <text:p text:style-name="Text_20_body">A detecção de objetos busca identificar e localizar instâncias de interesse por meio de caixas delimitadoras. A família YOLO reformulou essa tarefa como uma única etapa de regressão, favorecendo aplicações que demandam baixa latência (Redmon et al., 2016). Suas sucessivas versões incorporaram alterações arquiteturais voltadas ao equilíbrio entre precisão e velocidade (Terven, Córdova-Esparza e Romero-González, 2023; Khanam e Hussain, 2024).</text:p>
      <text:p text:style-name="Text_20_body">No domínio dos resíduos, o TACO disponibilizou imagens e anotações de lixo em ambientes reais, incluindo objetos deformados, fragmentados, transparentes ou parcialmente ocultos (Proença e Simões, 2020). Majchrowska et al. (2022) investigaram detecção em ambientes naturais e urbanos, enquanto Córdova et al. (2022) compararam diferentes arquiteturas, incluindo Faster R-CNN, Mask R-CNN, RetinaNet, EfficientDet e YOLOv5.</text:p>
      <text:p text:style-name="Text_20_body"><text:soft-page-break/>Esses estudos demonstram a aplicabilidade da visão computacional, mas também evidenciam dificuldades relacionadas a objetos pequenos, oclusão, iluminação, fundos complexos e diferenças entre domínios. Um detector treinado em bases internacionais pode não generalizar adequadamente para ruas brasileiras sem adaptação local.</text:p>
      <text:h text:style-name="Heading_20_3" text:outline-level="3">2.2 Modelos visão-linguagem</text:h>
      <text:p text:style-name="Text_20_body">Modelos visão-linguagem aprendem relações entre representações visuais e linguagem natural. A supervisão multimodal possibilita reconhecimento orientado por descrições textuais e execução de tarefas sem exemplos específicos do domínio-alvo (Radford et al., 2021; Li et al., 2023).</text:p>
      <text:p text:style-name="Text_20_body">O Gemma 3 é uma família multimodal capaz de receber imagens e texto e produzir respostas orientadas por instruções (Gemma Team, 2025). Embora modelos desse tipo ofereçam flexibilidade, pesquisas apontam desafios de estabilidade, alinhamento, <text:span text:style-name="Emphasis">grounding</text:span> visual, custo computacional e produção de respostas não sustentadas pelo conteúdo da imagem (Li et al., 2025).</text:p>
      <text:p text:style-name="Text_20_body">Funk et al. (2025) avaliaram VLMs na classificação de resíduos em regime <text:span text:style-name="Emphasis">few-shot</text:span>. Malla, Bazli e Arashpour (2026) estudaram destilação de modelos visão-linguagem para classificação eficiente de resíduos. O presente trabalho diferencia-se por comparar diretamente um VLM generalista em <text:span text:style-name="Emphasis">zero-shot</text:span> e um detector especializado, usando imagens de vias brasileiras e incluindo métricas operacionais relevantes à administração pública.</text:p>
      <text:p text:style-name="Horizontal_20_Line"/>
      <text:h text:style-name="Heading_20_2" text:outline-level="2">3. Metodologia</text:h>
      <text:h text:style-name="Heading_20_3" text:outline-level="3">3.1 Tarefa e dados</text:h>
      <text:p text:style-name="Text_20_body">A unidade de análise foi a imagem. Cada amostra foi classificada como <text:span text:style-name="Strong_20_Emphasis">com resíduo visível</text:span> ou <text:span text:style-name="Strong_20_Emphasis">sem resíduo visível</text:span>. O objetivo não foi identificar o tipo, o volume ou a gravidade sanitária do descarte, mas avaliar uma tarefa inicial de triagem binária.</text:p>
      <text:p text:style-name="Text_20_body">O treinamento do YOLOv11m utilizou imagens positivas das bases TACO e Trash Detection e imagens negativas da base Sidewalk Segmentation. Todas as categorias positivas foram agregadas na classe única “lixo”. Imagens negativas foram representadas por arquivos de anotação vazios.</text:p>
      <text:p text:style-name="Text_20_body">Após seleção e deduplicação, os conjuntos apresentaram a composição da Tabela 1.</text:p>
      <text:p text:style-name="Text_20_body"><text:span text:style-name="Strong_20_Emphasis">Tabela 1 – Composição dos conjuntos experimentais</text:span></text:p>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Conjunto</text:p>
            </table:table-cell>
            <table:table-cell table:style-name="Tabela1.A1" office:value-type="string">
              <text:p text:style-name="P2">Total</text:p>
            </table:table-cell>
            <table:table-cell table:style-name="Tabela1.A1" office:value-type="string">
              <text:p text:style-name="P2">Positivas</text:p>
            </table:table-cell>
            <table:table-cell table:style-name="Tabela1.A1" office:value-type="string">
              <text:p text:style-name="P2">Negativas/background</text:p>
            </table:table-cell>
          </table:table-row>
        </table:table-header-rows>
        <table:table-row>
          <table:table-cell table:style-name="Tabela1.A1" office:value-type="string">
            <text:p text:style-name="Table_20_Contents">Treinamento</text:p>
          </table:table-cell>
          <table:table-cell table:style-name="Tabela1.A1" office:value-type="string">
            <text:p text:style-name="P1">6.736</text:p>
          </table:table-cell>
          <table:table-cell table:style-name="Tabela1.A1" office:value-type="string">
            <text:p text:style-name="P1">5.685</text:p>
          </table:table-cell>
          <table:table-cell table:style-name="Tabela1.A1" office:value-type="string">
            <text:p text:style-name="P1">1.051</text:p>
          </table:table-cell>
        </table:table-row>
        <table:table-row>
          <table:table-cell table:style-name="Tabela1.A1" office:value-type="string">
            <text:p text:style-name="Table_20_Contents">Validação</text:p>
          </table:table-cell>
          <table:table-cell table:style-name="Tabela1.A1" office:value-type="string">
            <text:p text:style-name="P1">1.286</text:p>
          </table:table-cell>
          <table:table-cell table:style-name="Tabela1.A1" office:value-type="string">
            <text:p text:style-name="P1">1.101</text:p>
          </table:table-cell>
          <table:table-cell table:style-name="Tabela1.A1" office:value-type="string">
            <text:p text:style-name="P1">185</text:p>
          </table:table-cell>
        </table:table-row>
        <table:table-row>
          <table:table-cell table:style-name="Tabela1.A1" office:value-type="string">
            <text:p text:style-name="Table_20_Contents">Teste brasileiro</text:p>
          </table:table-cell>
          <table:table-cell table:style-name="Tabela1.A1" office:value-type="string">
            <text:p text:style-name="P1">560</text:p>
          </table:table-cell>
          <table:table-cell table:style-name="Tabela1.A1" office:value-type="string">
            <text:p text:style-name="P1">280</text:p>
          </table:table-cell>
          <table:table-cell table:style-name="Tabela1.A1" office:value-type="string">
            <text:p text:style-name="P1">280</text:p>
          </table:table-cell>
        </table:table-row>
      </table:table>
      <text:p text:style-name="Text_20_body">As imagens do teste foram obtidas de registros reais de vias públicas brasileiras, incluindo capturas de plataformas de visualização urbana, fotografias próprias e imagens disponibilizadas por projetos ou organizações. O conjunto foi mantido separado das bases de treinamento.</text:p>
      <text:p text:style-name="Text_20_body">O <text:span text:style-name="Emphasis">ground truth</text:span> foi definido por inspeção visual. Sacos, embalagens, garrafas, papelão, plásticos e materiais irregularmente descartados foram considerados resíduos. Lixeiras fechadas em uso <text:soft-page-break/>normal, mobiliário urbano, vegetação e objetos utilitários foram classificados como não resíduos. Casos ambíguos foram submetidos a nova inspeção pelo pesquisador.</text:p>
      <text:p text:style-name="Text_20_body">A integridade das divisões foi avaliada por deduplicação perceptual com <text:span text:style-name="Emphasis">pHash</text:span>, utilizando distância máxima igual a 5. No conjunto bruto de treinamento, 1.661 duplicatas perceptuais foram removidas de 10.211 imagens. Não foram encontradas duplicatas no teste nem correspondências perceptuais entre treinamento e teste.</text:p>
      <text:p text:style-name="Text_20_body">Imagens com rostos, placas ou outros elementos identificáveis foram descartadas, recortadas ou anonimizadas. O desfoque automático das plataformas de visualização urbana foi considerado apenas uma medida auxiliar, não substituindo a revisão manual.</text:p>
      <text:h text:style-name="Heading_20_3" text:outline-level="3">3.2 Modelos e configurações</text:h>
      <text:p text:style-name="Text_20_body">O experimento comparou duas estratégias assimétricas, mas representativas de decisões reais de adoção: treinar um modelo especializado ou empregar um modelo generalista sem treinamento adicional.</text:p>
      <text:p text:style-name="Text_20_body"><text:span text:style-name="Strong_20_Emphasis">Tabela 2 – Configuração dos modelos</text:span></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Table_20_Heading">Elemento</text:p>
            </table:table-cell>
            <table:table-cell table:style-name="Tabela2.A1" office:value-type="string">
              <text:p text:style-name="Table_20_Heading">YOLOv11m</text:p>
            </table:table-cell>
            <table:table-cell table:style-name="Tabela2.A1" office:value-type="string">
              <text:p text:style-name="Table_20_Heading">Gemma 3 27B-IT</text:p>
            </table:table-cell>
          </table:table-row>
        </table:table-header-rows>
        <table:table-row>
          <table:table-cell table:style-name="Tabela2.A1" office:value-type="string">
            <text:p text:style-name="Table_20_Contents">Regime</text:p>
          </table:table-cell>
          <table:table-cell table:style-name="Tabela2.A1" office:value-type="string">
            <text:p text:style-name="Table_20_Contents"><text:span text:style-name="Emphasis">Fine-tuning</text:span> supervisionado</text:p>
          </table:table-cell>
          <table:table-cell table:style-name="Tabela2.A1" office:value-type="string">
            <text:p text:style-name="Table_20_Contents"><text:span text:style-name="Emphasis">Zero-shot</text:span></text:p>
          </table:table-cell>
        </table:table-row>
        <table:table-row>
          <table:table-cell table:style-name="Tabela2.A1" office:value-type="string">
            <text:p text:style-name="Table_20_Contents">Saída principal</text:p>
          </table:table-cell>
          <table:table-cell table:style-name="Tabela2.A1" office:value-type="string">
            <text:p text:style-name="Table_20_Contents">Caixas e confiança</text:p>
          </table:table-cell>
          <table:table-cell table:style-name="Tabela2.A1" office:value-type="string">
            <text:p text:style-name="Table_20_Contents">Classe binária em JSON</text:p>
          </table:table-cell>
        </table:table-row>
        <table:table-row>
          <table:table-cell table:style-name="Tabela2.A1" office:value-type="string">
            <text:p text:style-name="Table_20_Contents">Pesos/configuração</text:p>
          </table:table-cell>
          <table:table-cell table:style-name="Tabela2.A1" office:value-type="string">
            <text:p text:style-name="Table_20_Contents"><text:span text:style-name="Source_20_Text">yolo11m.pt</text:span></text:p>
          </table:table-cell>
          <table:table-cell table:style-name="Tabela2.A1" office:value-type="string">
            <text:p text:style-name="Table_20_Contents">Quantização Q5_K_M</text:p>
          </table:table-cell>
        </table:table-row>
        <table:table-row>
          <table:table-cell table:style-name="Tabela2.A1" office:value-type="string">
            <text:p text:style-name="Table_20_Contents">Épocas</text:p>
          </table:table-cell>
          <table:table-cell table:style-name="Tabela2.A1" office:value-type="string">
            <text:p text:style-name="Table_20_Contents">100</text:p>
          </table:table-cell>
          <table:table-cell table:style-name="Tabela2.A1" office:value-type="string">
            <text:p text:style-name="Table_20_Contents">Não aplicável</text:p>
          </table:table-cell>
        </table:table-row>
        <table:table-row>
          <table:table-cell table:style-name="Tabela2.A1" office:value-type="string">
            <text:p text:style-name="Table_20_Contents">Resolução</text:p>
          </table:table-cell>
          <table:table-cell table:style-name="Tabela2.A1" office:value-type="string">
            <text:p text:style-name="Table_20_Contents">640 × 640</text:p>
          </table:table-cell>
          <table:table-cell table:style-name="Tabela2.A1" office:value-type="string">
            <text:p text:style-name="Table_20_Contents">Imagem original processada pelo servidor</text:p>
          </table:table-cell>
        </table:table-row>
        <table:table-row>
          <table:table-cell table:style-name="Tabela2.A1" office:value-type="string">
            <text:p text:style-name="Table_20_Contents"><text:span text:style-name="Emphasis">Batch size</text:span></text:p>
          </table:table-cell>
          <table:table-cell table:style-name="Tabela2.A1" office:value-type="string">
            <text:p text:style-name="Table_20_Contents">12</text:p>
          </table:table-cell>
          <table:table-cell table:style-name="Tabela2.A1" office:value-type="string">
            <text:p text:style-name="Table_20_Contents">Inferência individual</text:p>
          </table:table-cell>
        </table:table-row>
        <table:table-row>
          <table:table-cell table:style-name="Tabela2.A1" office:value-type="string">
            <text:p text:style-name="Table_20_Contents">Otimizador</text:p>
          </table:table-cell>
          <table:table-cell table:style-name="Tabela2.A1" office:value-type="string">
            <text:p text:style-name="Table_20_Contents">AdamW</text:p>
          </table:table-cell>
          <table:table-cell table:style-name="Tabela2.A1" office:value-type="string">
            <text:p text:style-name="Table_20_Contents">Não aplicável</text:p>
          </table:table-cell>
        </table:table-row>
        <table:table-row>
          <table:table-cell table:style-name="Tabela2.A1" office:value-type="string">
            <text:p text:style-name="Table_20_Contents">Taxa de aprendizado inicial</text:p>
          </table:table-cell>
          <table:table-cell table:style-name="Tabela2.A1" office:value-type="string">
            <text:p text:style-name="Table_20_Contents">0,001</text:p>
          </table:table-cell>
          <table:table-cell table:style-name="Tabela2.A1" office:value-type="string">
            <text:p text:style-name="Table_20_Contents">Não aplicável</text:p>
          </table:table-cell>
        </table:table-row>
        <table:table-row>
          <table:table-cell table:style-name="Tabela2.A1" office:value-type="string">
            <text:p text:style-name="Table_20_Contents"><text:span text:style-name="Emphasis">Early stopping</text:span></text:p>
          </table:table-cell>
          <table:table-cell table:style-name="Tabela2.A1" office:value-type="string">
            <text:p text:style-name="Table_20_Contents">Paciência 20</text:p>
          </table:table-cell>
          <table:table-cell table:style-name="Tabela2.A1" office:value-type="string">
            <text:p text:style-name="Table_20_Contents">Não aplicável</text:p>
          </table:table-cell>
        </table:table-row>
        <table:table-row>
          <table:table-cell table:style-name="Tabela2.A1" office:value-type="string">
            <text:p text:style-name="Table_20_Contents"><text:span text:style-name="Emphasis">Augmentation</text:span></text:p>
          </table:table-cell>
          <table:table-cell table:style-name="Tabela2.A1" office:value-type="string">
            <text:p text:style-name="Table_20_Contents"><text:span text:style-name="Source_20_Text">mosaic=1.0</text:span>, <text:span text:style-name="Source_20_Text">fliplr=0.5</text:span></text:p>
          </table:table-cell>
          <table:table-cell table:style-name="Tabela2.A1" office:value-type="string">
            <text:p text:style-name="Table_20_Contents">Não aplicável</text:p>
          </table:table-cell>
        </table:table-row>
        <table:table-row>
          <table:table-cell table:style-name="Tabela2.A1" office:value-type="string">
            <text:p text:style-name="Table_20_Contents">Limiar principal</text:p>
          </table:table-cell>
          <table:table-cell table:style-name="Tabela2.A1" office:value-type="string">
            <text:p text:style-name="Table_20_Contents">0,25</text:p>
          </table:table-cell>
          <table:table-cell table:style-name="Tabela2.A1" office:value-type="string">
            <text:p text:style-name="Table_20_Contents">Resposta binária</text:p>
          </table:table-cell>
        </table:table-row>
        <table:table-row>
          <table:table-cell table:style-name="Tabela2.A1" office:value-type="string">
            <text:p text:style-name="Table_20_Contents">Temperatura</text:p>
          </table:table-cell>
          <table:table-cell table:style-name="Tabela2.A1" office:value-type="string">
            <text:p text:style-name="Table_20_Contents">Não aplicável</text:p>
          </table:table-cell>
          <table:table-cell table:style-name="Tabela2.A1" office:value-type="string">
            <text:p text:style-name="Table_20_Contents">0</text:p>
          </table:table-cell>
        </table:table-row>
        <table:table-row>
          <table:table-cell table:style-name="Tabela2.A1" office:value-type="string">
            <text:p text:style-name="Table_20_Contents"><text:span text:style-name="Emphasis">Seed</text:span></text:p>
          </table:table-cell>
          <table:table-cell table:style-name="Tabela2.A1" office:value-type="string">
            <text:p text:style-name="Table_20_Contents">Configuração do experimento</text:p>
          </table:table-cell>
          <table:table-cell table:style-name="Tabela2.A1" office:value-type="string">
            <text:p text:style-name="Table_20_Contents">42</text:p>
          </table:table-cell>
        </table:table-row>
      </table:table>
      <text:p text:style-name="Text_20_body">O melhor <text:span text:style-name="Emphasis">checkpoint</text:span> do YOLOv11m foi selecionado pelas métricas de validação. Uma imagem foi considerada positiva quando apresentava ao menos uma detecção da classe “lixo” com confiança igual ou superior a 0,25.</text:p>
      <text:p text:style-name="Text_20_body">O Gemma 3 27B-IT foi executado localmente pelo LM Studio. O modelo recebeu cada imagem e uma instrução solicitando resposta estruturada sobre presença ou ausência de resíduos. A versão Q5_K_M foi utilizada devido à memória disponível na GPU.</text:p>
      <text:h text:style-name="Heading_20_3" text:outline-level="3">3.3 Avaliação</text:h>
      <text:p text:style-name="Text_20_body">Foram calculadas acurácia, precisão, sensibilidade, especificidade, F1-score, taxa de falsos positivos, kappa de Cohen, coeficiente de correlação de Matthews e matrizes de confusão.</text:p>
      <text:p text:style-name="Text_20_body"><text:soft-page-break/>O mAP não foi empregado como métrica comparativa principal porque o Gemma produziu uma classificação por imagem, sem caixas delimitadoras. A comparação foi, portanto, realizada em nível binário de imagem para ambos os modelos.</text:p>
      <text:p text:style-name="Text_20_body">Intervalos de confiança de 95% foram estimados pelo método de Wilson. Como os dois modelos foram avaliados sobre as mesmas imagens, utilizou-se o teste de McNemar para verificar a significância das discordâncias.</text:p>
      <text:p text:style-name="Text_20_body">A eficiência computacional foi analisada por latência média, mediana, percentil 95 e <text:span text:style-name="Emphasis">throughput</text:span>. Os experimentos foram executados em uma NVIDIA GeForce RTX 5090 com 32 GB de VRAM. No YOLO, o fluxo medido incluiu a leitura local da imagem e a execução do detector. No Gemma, a medida correspondeu ao período entre o início da requisição HTTP ao servidor local do LM Studio e o recebimento da resposta.</text:p>
      <text:p text:style-name="Horizontal_20_Line"/>
      <text:h text:style-name="Heading_20_2" text:outline-level="2">4. Resultados e Discussão</text:h>
      <text:h text:style-name="Heading_20_3" text:outline-level="3">4.1 Desempenho preditivo</text:h>
      <text:p text:style-name="Text_20_body">A Tabela 3 apresenta as métricas obtidas no conjunto de 560 imagens.</text:p>
      <text:p text:style-name="Text_20_body"><text:span text:style-name="Strong_20_Emphasis">Tabela 3 – Desempenho preditivo</text:span></text:p>
      <table:table table:name="Tabela3" table:style-name="Tabela3">
        <table:table-column table:style-name="Tabela3.A"/>
        <table:table-column table:style-name="Tabela3.B"/>
        <table:table-column table:style-name="Tabela3.C"/>
        <table:table-column table:style-name="Tabela3.D"/>
        <table:table-header-rows>
          <table:table-row>
            <table:table-cell table:style-name="Tabela3.A1" office:value-type="string">
              <text:p text:style-name="Table_20_Heading">Métrica</text:p>
            </table:table-cell>
            <table:table-cell table:style-name="Tabela3.A1" office:value-type="string">
              <text:p text:style-name="P2">YOLOv11m</text:p>
            </table:table-cell>
            <table:table-cell table:style-name="Tabela3.A1" office:value-type="string">
              <text:p text:style-name="P2">Gemma 3 27B-IT</text:p>
            </table:table-cell>
            <table:table-cell table:style-name="Tabela3.A1" office:value-type="string">
              <text:p text:style-name="P2">Diferença</text:p>
            </table:table-cell>
          </table:table-row>
        </table:table-header-rows>
        <table:table-row>
          <table:table-cell table:style-name="Tabela3.A1" office:value-type="string">
            <text:p text:style-name="Table_20_Contents">Acurácia</text:p>
          </table:table-cell>
          <table:table-cell table:style-name="Tabela3.A1" office:value-type="string">
            <text:p text:style-name="P1">0,7071</text:p>
          </table:table-cell>
          <table:table-cell table:style-name="Tabela3.A1" office:value-type="string">
            <text:p text:style-name="P1">0,9179</text:p>
          </table:table-cell>
          <table:table-cell table:style-name="Tabela3.A1" office:value-type="string">
            <text:p text:style-name="P1">+0,2108</text:p>
          </table:table-cell>
        </table:table-row>
        <table:table-row>
          <table:table-cell table:style-name="Tabela3.A1" office:value-type="string">
            <text:p text:style-name="Table_20_Contents">Precisão</text:p>
          </table:table-cell>
          <table:table-cell table:style-name="Tabela3.A1" office:value-type="string">
            <text:p text:style-name="P1">0,7117</text:p>
          </table:table-cell>
          <table:table-cell table:style-name="Tabela3.A1" office:value-type="string">
            <text:p text:style-name="P1">0,8611</text:p>
          </table:table-cell>
          <table:table-cell table:style-name="Tabela3.A1" office:value-type="string">
            <text:p text:style-name="P1">+0,1494</text:p>
          </table:table-cell>
        </table:table-row>
        <table:table-row>
          <table:table-cell table:style-name="Tabela3.A1" office:value-type="string">
            <text:p text:style-name="Table_20_Contents">Sensibilidade</text:p>
          </table:table-cell>
          <table:table-cell table:style-name="Tabela3.A1" office:value-type="string">
            <text:p text:style-name="P1">0,6964</text:p>
          </table:table-cell>
          <table:table-cell table:style-name="Tabela3.A1" office:value-type="string">
            <text:p text:style-name="P1">0,9964</text:p>
          </table:table-cell>
          <table:table-cell table:style-name="Tabela3.A1" office:value-type="string">
            <text:p text:style-name="P1">+0,3000</text:p>
          </table:table-cell>
        </table:table-row>
        <table:table-row>
          <table:table-cell table:style-name="Tabela3.A1" office:value-type="string">
            <text:p text:style-name="Table_20_Contents">Especificidade</text:p>
          </table:table-cell>
          <table:table-cell table:style-name="Tabela3.A1" office:value-type="string">
            <text:p text:style-name="P1">0,7179</text:p>
          </table:table-cell>
          <table:table-cell table:style-name="Tabela3.A1" office:value-type="string">
            <text:p text:style-name="P1">0,8393</text:p>
          </table:table-cell>
          <table:table-cell table:style-name="Tabela3.A1" office:value-type="string">
            <text:p text:style-name="P1">+0,1214</text:p>
          </table:table-cell>
        </table:table-row>
        <table:table-row>
          <table:table-cell table:style-name="Tabela3.A1" office:value-type="string">
            <text:p text:style-name="Table_20_Contents">F1-score</text:p>
          </table:table-cell>
          <table:table-cell table:style-name="Tabela3.A1" office:value-type="string">
            <text:p text:style-name="P1">0,7040</text:p>
          </table:table-cell>
          <table:table-cell table:style-name="Tabela3.A1" office:value-type="string">
            <text:p text:style-name="P1">0,9238</text:p>
          </table:table-cell>
          <table:table-cell table:style-name="Tabela3.A1" office:value-type="string">
            <text:p text:style-name="P1">+0,2198</text:p>
          </table:table-cell>
        </table:table-row>
        <table:table-row>
          <table:table-cell table:style-name="Tabela3.A1" office:value-type="string">
            <text:p text:style-name="Table_20_Contents">Taxa de falsos positivos</text:p>
          </table:table-cell>
          <table:table-cell table:style-name="Tabela3.A1" office:value-type="string">
            <text:p text:style-name="P1">0,2821</text:p>
          </table:table-cell>
          <table:table-cell table:style-name="Tabela3.A1" office:value-type="string">
            <text:p text:style-name="P1">0,1607</text:p>
          </table:table-cell>
          <table:table-cell table:style-name="Tabela3.A1" office:value-type="string">
            <text:p text:style-name="P1">−0,1214</text:p>
          </table:table-cell>
        </table:table-row>
        <table:table-row>
          <table:table-cell table:style-name="Tabela3.A1" office:value-type="string">
            <text:p text:style-name="Table_20_Contents">MCC</text:p>
          </table:table-cell>
          <table:table-cell table:style-name="Tabela3.A1" office:value-type="string">
            <text:p text:style-name="P1">0,414</text:p>
          </table:table-cell>
          <table:table-cell table:style-name="Tabela3.A1" office:value-type="string">
            <text:p text:style-name="P1">0,846</text:p>
          </table:table-cell>
          <table:table-cell table:style-name="Tabela3.A1" office:value-type="string">
            <text:p text:style-name="P1">+0,432</text:p>
          </table:table-cell>
        </table:table-row>
        <table:table-row>
          <table:table-cell table:style-name="Tabela3.A1" office:value-type="string">
            <text:p text:style-name="Table_20_Contents">Kappa de Cohen</text:p>
          </table:table-cell>
          <table:table-cell table:style-name="Tabela3.A1" office:value-type="string">
            <text:p text:style-name="P1">0,414</text:p>
          </table:table-cell>
          <table:table-cell table:style-name="Tabela3.A1" office:value-type="string">
            <text:p text:style-name="P1">0,836</text:p>
          </table:table-cell>
          <table:table-cell table:style-name="Tabela3.A1" office:value-type="string">
            <text:p text:style-name="P1">+0,422</text:p>
          </table:table-cell>
        </table:table-row>
      </table:table>
      <text:p text:style-name="Text_20_body">O Gemma apresentou vantagem em todas as métricas preditivas. A diferença mais expressiva ocorreu na sensibilidade: o modelo identificou 279 das 280 imagens positivas, enquanto o YOLO identificou 195. Assim, o Gemma produziu apenas um falso negativo, contra 85 do detector.</text:p>
      <text:p text:style-name="Text_20_body">A matriz de confusão também mostra que o modelo visão-linguagem apresentou maior capacidade de rejeitar cenas negativas.</text:p>
      <text:p text:style-name="Text_20_body"><text:span text:style-name="Strong_20_Emphasis">Tabela 4 – Matrizes de confusão</text:span></text:p>
      <table:table table:name="Tabela4" table:style-name="Tabela4">
        <table:table-column table:style-name="Tabela4.A"/>
        <table:table-column table:style-name="Tabela4.B" table:number-columns-repeated="2"/>
        <table:table-column table:style-name="Tabela4.D"/>
        <table:table-column table:style-name="Tabela4.E"/>
        <table:table-header-rows>
          <table:table-row>
            <table:table-cell table:style-name="Tabela4.A1" office:value-type="string">
              <text:p text:style-name="Table_20_Heading">Modelo</text:p>
            </table:table-cell>
            <table:table-cell table:style-name="Tabela4.A1" office:value-type="string">
              <text:p text:style-name="P2">VP</text:p>
            </table:table-cell>
            <table:table-cell table:style-name="Tabela4.A1" office:value-type="string">
              <text:p text:style-name="P2">VN</text:p>
            </table:table-cell>
            <table:table-cell table:style-name="Tabela4.A1" office:value-type="string">
              <text:p text:style-name="P2">FP</text:p>
            </table:table-cell>
            <table:table-cell table:style-name="Tabela4.A1" office:value-type="string">
              <text:p text:style-name="P2">FN</text:p>
            </table:table-cell>
          </table:table-row>
        </table:table-header-rows>
        <table:table-row>
          <table:table-cell table:style-name="Tabela4.A1" office:value-type="string">
            <text:p text:style-name="Table_20_Contents">YOLOv11m</text:p>
          </table:table-cell>
          <table:table-cell table:style-name="Tabela4.A1" office:value-type="string">
            <text:p text:style-name="P1">195</text:p>
          </table:table-cell>
          <table:table-cell table:style-name="Tabela4.A1" office:value-type="string">
            <text:p text:style-name="P1">201</text:p>
          </table:table-cell>
          <table:table-cell table:style-name="Tabela4.A1" office:value-type="string">
            <text:p text:style-name="P1">79</text:p>
          </table:table-cell>
          <table:table-cell table:style-name="Tabela4.A1" office:value-type="string">
            <text:p text:style-name="P1">85</text:p>
          </table:table-cell>
        </table:table-row>
        <table:table-row>
          <table:table-cell table:style-name="Tabela4.A1" office:value-type="string">
            <text:p text:style-name="Table_20_Contents">Gemma 3 27B-IT</text:p>
          </table:table-cell>
          <table:table-cell table:style-name="Tabela4.A1" office:value-type="string">
            <text:p text:style-name="P1">279</text:p>
          </table:table-cell>
          <table:table-cell table:style-name="Tabela4.A1" office:value-type="string">
            <text:p text:style-name="P1">235</text:p>
          </table:table-cell>
          <table:table-cell table:style-name="Tabela4.A1" office:value-type="string">
            <text:p text:style-name="P1">45</text:p>
          </table:table-cell>
          <table:table-cell table:style-name="Tabela4.A1" office:value-type="string">
            <text:p text:style-name="P1">1</text:p>
          </table:table-cell>
        </table:table-row>
      </table:table>
      <text:p text:style-name="Text_20_body">Em uma aplicação pública, falsos negativos podem representar pontos de descarte não identificados. Falsos positivos podem gerar verificações manuais, abertura indevida de chamados ou deslocamento desnecessário de equipes. Portanto, ambos os tipos de erro possuem custos administrativos, cuja importância depende do fluxo de trabalho adotado.</text:p>
      <text:p text:style-name="Text_20_body"><text:soft-page-break/>Os intervalos de confiança de 95% para a acurácia foram <text:span text:style-name="Source_20_Text">[0,668; 0,743]</text:span> para o YOLO e <text:span text:style-name="Source_20_Text">[0,892; 0,938]</text:span> para o Gemma. Para a sensibilidade, os intervalos foram <text:span text:style-name="Source_20_Text">[0,640; 0,747]</text:span> e <text:span text:style-name="Source_20_Text">[0,980; 0,999]</text:span>, respectivamente.</text:p>
      <text:p text:style-name="Text_20_body">O teste de McNemar resultou em (\chi^2=74,40), com (p\approx6,4\times10^{-18}). O Gemma acertou sozinho 151 imagens, enquanto o YOLO acertou sozinho 33. A diferença preditiva não pode, portanto, ser explicada apenas por variação aleatória nesse conjunto.</text:p>
      <text:p text:style-name="Text_20_body">Esses resultados respondem à <text:span text:style-name="Strong_20_Emphasis">RQ1</text:span>: nas condições avaliadas e para a tarefa binária em nível de imagem, o Gemma 3 27B-IT apresentou desempenho preditivo significativamente superior.</text:p>
      <text:h text:style-name="Heading_20_3" text:outline-level="3">4.2 Sensibilidade ao limiar do YOLO</text:h>
      <text:p text:style-name="Text_20_body">O limiar de confiança altera o equilíbrio entre sensibilidade e falsos positivos. A Tabela 5 apresenta os quatro pontos avaliados.</text:p>
      <text:p text:style-name="Text_20_body"><text:span text:style-name="Strong_20_Emphasis">Tabela 5 – Sensibilidade ao limiar do YOLOv11m</text:span></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header-rows>
          <table:table-row>
            <table:table-cell table:style-name="Tabela5.A1" office:value-type="string">
              <text:p text:style-name="P2">Limiar</text:p>
            </table:table-cell>
            <table:table-cell table:style-name="Tabela5.A1" office:value-type="string">
              <text:p text:style-name="P2">Acurácia</text:p>
            </table:table-cell>
            <table:table-cell table:style-name="Tabela5.A1" office:value-type="string">
              <text:p text:style-name="P2">Precisão</text:p>
            </table:table-cell>
            <table:table-cell table:style-name="Tabela5.A1" office:value-type="string">
              <text:p text:style-name="P2">Sensibilidade</text:p>
            </table:table-cell>
            <table:table-cell table:style-name="Tabela5.A1" office:value-type="string">
              <text:p text:style-name="P2">Especificidade</text:p>
            </table:table-cell>
            <table:table-cell table:style-name="Tabela5.A1" office:value-type="string">
              <text:p text:style-name="P2">F1</text:p>
            </table:table-cell>
            <table:table-cell table:style-name="Tabela5.A1" office:value-type="string">
              <text:p text:style-name="P2">FPR</text:p>
            </table:table-cell>
          </table:table-row>
        </table:table-header-rows>
        <table:table-row>
          <table:table-cell table:style-name="Tabela5.A1" office:value-type="string">
            <text:p text:style-name="P1">0,25</text:p>
          </table:table-cell>
          <table:table-cell table:style-name="Tabela5.A1" office:value-type="string">
            <text:p text:style-name="P1">0,7071</text:p>
          </table:table-cell>
          <table:table-cell table:style-name="Tabela5.A1" office:value-type="string">
            <text:p text:style-name="P1">0,7117</text:p>
          </table:table-cell>
          <table:table-cell table:style-name="Tabela5.A1" office:value-type="string">
            <text:p text:style-name="P1">0,6964</text:p>
          </table:table-cell>
          <table:table-cell table:style-name="Tabela5.A1" office:value-type="string">
            <text:p text:style-name="P1">0,7179</text:p>
          </table:table-cell>
          <table:table-cell table:style-name="Tabela5.A1" office:value-type="string">
            <text:p text:style-name="P1">0,7040</text:p>
          </table:table-cell>
          <table:table-cell table:style-name="Tabela5.A1" office:value-type="string">
            <text:p text:style-name="P1">0,2821</text:p>
          </table:table-cell>
        </table:table-row>
        <table:table-row>
          <table:table-cell table:style-name="Tabela5.A1" office:value-type="string">
            <text:p text:style-name="P1">0,35</text:p>
          </table:table-cell>
          <table:table-cell table:style-name="Tabela5.A1" office:value-type="string">
            <text:p text:style-name="P1">0,7268</text:p>
          </table:table-cell>
          <table:table-cell table:style-name="Tabela5.A1" office:value-type="string">
            <text:p text:style-name="P1">0,7617</text:p>
          </table:table-cell>
          <table:table-cell table:style-name="Tabela5.A1" office:value-type="string">
            <text:p text:style-name="P1">0,6464</text:p>
          </table:table-cell>
          <table:table-cell table:style-name="Tabela5.A1" office:value-type="string">
            <text:p text:style-name="P1">0,8071</text:p>
          </table:table-cell>
          <table:table-cell table:style-name="Tabela5.A1" office:value-type="string">
            <text:p text:style-name="P1">0,6967</text:p>
          </table:table-cell>
          <table:table-cell table:style-name="Tabela5.A1" office:value-type="string">
            <text:p text:style-name="P1">0,1929</text:p>
          </table:table-cell>
        </table:table-row>
        <table:table-row>
          <table:table-cell table:style-name="Tabela5.A1" office:value-type="string">
            <text:p text:style-name="P1">0,50</text:p>
          </table:table-cell>
          <table:table-cell table:style-name="Tabela5.A1" office:value-type="string">
            <text:p text:style-name="P1">0,7054</text:p>
          </table:table-cell>
          <table:table-cell table:style-name="Tabela5.A1" office:value-type="string">
            <text:p text:style-name="P1">0,8182</text:p>
          </table:table-cell>
          <table:table-cell table:style-name="Tabela5.A1" office:value-type="string">
            <text:p text:style-name="P1">0,5464</text:p>
          </table:table-cell>
          <table:table-cell table:style-name="Tabela5.A1" office:value-type="string">
            <text:p text:style-name="P1">0,8643</text:p>
          </table:table-cell>
          <table:table-cell table:style-name="Tabela5.A1" office:value-type="string">
            <text:p text:style-name="P1">0,6548</text:p>
          </table:table-cell>
          <table:table-cell table:style-name="Tabela5.A1" office:value-type="string">
            <text:p text:style-name="P1">0,1357</text:p>
          </table:table-cell>
        </table:table-row>
        <table:table-row>
          <table:table-cell table:style-name="Tabela5.A1" office:value-type="string">
            <text:p text:style-name="P1">0,65</text:p>
          </table:table-cell>
          <table:table-cell table:style-name="Tabela5.A1" office:value-type="string">
            <text:p text:style-name="P1">0,6661</text:p>
          </table:table-cell>
          <table:table-cell table:style-name="Tabela5.A1" office:value-type="string">
            <text:p text:style-name="P1">0,8737</text:p>
          </table:table-cell>
          <table:table-cell table:style-name="Tabela5.A1" office:value-type="string">
            <text:p text:style-name="P1">0,4286</text:p>
          </table:table-cell>
          <table:table-cell table:style-name="Tabela5.A1" office:value-type="string">
            <text:p text:style-name="P1">0,9036</text:p>
          </table:table-cell>
          <table:table-cell table:style-name="Tabela5.A1" office:value-type="string">
            <text:p text:style-name="P1">0,5746</text:p>
          </table:table-cell>
          <table:table-cell table:style-name="Tabela5.A1" office:value-type="string">
            <text:p text:style-name="P1">0,0964</text:p>
          </table:table-cell>
        </table:table-row>
      </table:table>
      <text:p text:style-name="Text_20_body">O aumento do limiar reduz falsos positivos, mas eleva substancialmente as omissões. Em 0,65, a especificidade supera 0,90, porém a sensibilidade cai para 0,4286. Assim, o ponto de operação não deve ser escolhido apenas pela maior acurácia, mas pelo custo relativo dos erros.</text:p>
      <text:p text:style-name="Text_20_body">Para uma triagem ampla, limiares menores podem ser aceitáveis quando alertas passam por validação posterior. Para acionamento automático de equipes, um limiar maior pode reduzir custos, mas aumentaria a quantidade de ocorrências não identificadas.</text:p>
      <text:h text:style-name="Heading_20_3" text:outline-level="3">4.3 Eficiência computacional</text:h>
      <text:p text:style-name="Text_20_body">A vantagem preditiva do Gemma foi acompanhada por custo computacional significativamente maior.</text:p>
      <text:p text:style-name="Text_20_body"><text:span text:style-name="Strong_20_Emphasis">Tabela 6 – Eficiência computacional</text:span></text:p>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Table_20_Heading">Indicador</text:p>
            </table:table-cell>
            <table:table-cell table:style-name="Tabela6.A1" office:value-type="string">
              <text:p text:style-name="P2">YOLOv11m</text:p>
            </table:table-cell>
            <table:table-cell table:style-name="Tabela6.A1" office:value-type="string">
              <text:p text:style-name="P2">Gemma 3 27B-IT</text:p>
            </table:table-cell>
          </table:table-row>
        </table:table-header-rows>
        <table:table-row>
          <table:table-cell table:style-name="Tabela6.A1" office:value-type="string">
            <text:p text:style-name="Table_20_Contents">Latência média</text:p>
          </table:table-cell>
          <table:table-cell table:style-name="Tabela6.A1" office:value-type="string">
            <text:p text:style-name="P1">8,4 ms</text:p>
          </table:table-cell>
          <table:table-cell table:style-name="Tabela6.A1" office:value-type="string">
            <text:p text:style-name="P1">1.191,9 ms</text:p>
          </table:table-cell>
        </table:table-row>
        <table:table-row>
          <table:table-cell table:style-name="Tabela6.A1" office:value-type="string">
            <text:p text:style-name="Table_20_Contents">Mediana</text:p>
          </table:table-cell>
          <table:table-cell table:style-name="Tabela6.A1" office:value-type="string">
            <text:p text:style-name="P1">8,4 ms</text:p>
          </table:table-cell>
          <table:table-cell table:style-name="Tabela6.A1" office:value-type="string">
            <text:p text:style-name="P1">1.172,2 ms</text:p>
          </table:table-cell>
        </table:table-row>
        <table:table-row>
          <table:table-cell table:style-name="Tabela6.A1" office:value-type="string">
            <text:p text:style-name="Table_20_Contents">Percentil 95</text:p>
          </table:table-cell>
          <table:table-cell table:style-name="Tabela6.A1" office:value-type="string">
            <text:p text:style-name="P1">9,3 ms</text:p>
          </table:table-cell>
          <table:table-cell table:style-name="Tabela6.A1" office:value-type="string">
            <text:p text:style-name="P1">1.346,9 ms</text:p>
          </table:table-cell>
        </table:table-row>
        <table:table-row>
          <table:table-cell table:style-name="Tabela6.A1" office:value-type="string">
            <text:p text:style-name="Table_20_Contents"><text:span text:style-name="Emphasis">Throughput</text:span></text:p>
          </table:table-cell>
          <table:table-cell table:style-name="Tabela6.A1" office:value-type="string">
            <text:p text:style-name="P1">119 imagens/s</text:p>
          </table:table-cell>
          <table:table-cell table:style-name="Tabela6.A1" office:value-type="string">
            <text:p text:style-name="P1">0,839 imagem/s</text:p>
          </table:table-cell>
        </table:table-row>
      </table:table>
      <text:p text:style-name="Text_20_body">A latência média do Gemma foi aproximadamente 141,9 vezes maior. O YOLO, portanto, apresenta clara vantagem quando há transmissão contínua, alto volume ou necessidade de resposta próxima do tempo real.</text:p>
      <text:p text:style-name="Text_20_body">A comparação de latência deve ser interpretada como uma avaliação dos fluxos implementados, não como uma comparação isolada do tempo interno das arquiteturas. O Gemma foi acessado por interface HTTP e servidor intermediário, enquanto o YOLO foi executado diretamente no ambiente local. Ainda assim, a diferença superior a duas ordens de magnitude é operacionalmente relevante.</text:p>
      <text:p text:style-name="Text_20_body"><text:soft-page-break/>A <text:span text:style-name="Strong_20_Emphasis">RQ2</text:span> não admite um vencedor único. O Gemma oferece maior qualidade preditiva, enquanto o YOLO oferece velocidade, menor custo por imagem e localização explícita dos objetos.</text:p>
      <text:h text:style-name="Heading_20_3" text:outline-level="3">4.4 Análise dos erros e complementaridade</text:h>
      <text:p text:style-name="Text_20_body">Os modelos acertaram conjuntamente 363 imagens, correspondentes a 64,8% do teste. Apenas o Gemma acertou 151 imagens; apenas o YOLO acertou 33; e ambos erraram 13.</text:p>
      <text:p text:style-name="Text_20_body">Nos falsos negativos do YOLO foram observados resíduos amassados, molhados, dispersos ou misturados ao pavimento, além de variações de iluminação, perspectiva e enquadramento. Algumas omissões ocorreram mesmo quando os resíduos eram visualmente relevantes. Esse comportamento sugere possível deslocamento de domínio entre as bases usadas no treinamento e as vias brasileiras, embora essa hipótese não tenha sido testada de forma controlada.</text:p>
      <text:p text:style-name="Text_20_body">O Gemma apresentou somente um falso negativo, mas produziu 45 falsos positivos. Sua elevada sensibilidade indica capacidade de interpretar sinais contextuais da cena, mas essa mesma interpretação pode resultar em sobre-sinalização de objetos ou condições visuais associadas a descarte, mesmo quando o resíduo não está presente.</text:p>
      <text:p text:style-name="Text_20_body">As discordâncias sugerem complementaridade parcial. Um sistema híbrido poderia empregar o YOLO na primeira etapa, processando rapidamente grandes volumes, e encaminhar imagens positivas, duvidosas ou de baixa confiança ao Gemma. Essa estratégia deve ser avaliada em novo experimento, pois os resultados atuais não demonstram diretamente seu desempenho.</text:p>
      <text:h text:style-name="Heading_20_3" text:outline-level="3">4.5 Implicações para a gestão pública</text:h>
      <text:p text:style-name="Text_20_body">Os resultados indicam três cenários principais:</text:p>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Table_20_Heading">Cenário</text:p>
            </table:table-cell>
            <table:table-cell table:style-name="Tabela7.A1" office:value-type="string">
              <text:p text:style-name="Table_20_Heading">Estratégia mais adequada</text:p>
            </table:table-cell>
            <table:table-cell table:style-name="Tabela7.A1" office:value-type="string">
              <text:p text:style-name="Table_20_Heading">Justificativa</text:p>
            </table:table-cell>
          </table:table-row>
        </table:table-header-rows>
        <table:table-row>
          <table:table-cell table:style-name="Tabela7.A1" office:value-type="string">
            <text:p text:style-name="Table_20_Contents">Monitoramento contínuo ou alto volume</text:p>
          </table:table-cell>
          <table:table-cell table:style-name="Tabela7.A1" office:value-type="string">
            <text:p text:style-name="Table_20_Contents">YOLOv11m</text:p>
          </table:table-cell>
          <table:table-cell table:style-name="Tabela7.A1" office:value-type="string">
            <text:p text:style-name="Table_20_Contents">Baixa latência, alto <text:span text:style-name="Emphasis">throughput</text:span> e caixas delimitadoras</text:p>
          </table:table-cell>
        </table:table-row>
        <table:table-row>
          <table:table-cell table:style-name="Tabela7.A1" office:value-type="string">
            <text:p text:style-name="Table_20_Contents">Auditoria ou análise pontual</text:p>
          </table:table-cell>
          <table:table-cell table:style-name="Tabela7.A1" office:value-type="string">
            <text:p text:style-name="Table_20_Contents">Gemma 3 27B-IT</text:p>
          </table:table-cell>
          <table:table-cell table:style-name="Tabela7.A1" office:value-type="string">
            <text:p text:style-name="Table_20_Contents">Maior F1, sensibilidade quase perfeita e menor FPR</text:p>
          </table:table-cell>
        </table:table-row>
        <table:table-row>
          <table:table-cell table:style-name="Tabela7.A1" office:value-type="string">
            <text:p text:style-name="Table_20_Contents">Triagem seguida de confirmação</text:p>
          </table:table-cell>
          <table:table-cell table:style-name="Tabela7.A1" office:value-type="string">
            <text:p text:style-name="Table_20_Contents">Arquitetura híbrida</text:p>
          </table:table-cell>
          <table:table-cell table:style-name="Tabela7.A1" office:value-type="string">
            <text:p text:style-name="Table_20_Contents">Possível combinação de velocidade e qualidade preditiva</text:p>
          </table:table-cell>
        </table:table-row>
      </table:table>
      <text:p text:style-name="Text_20_body">O YOLO permite que o servidor processe elevado número de imagens, preserve a localização visual do objeto e encaminhe apenas parte dos registros para revisão. Entretanto, seu desempenho indica necessidade de treinamento adicional com imagens representativas do município.</text:p>
      <text:p text:style-name="Text_20_body">O Gemma reduz a necessidade inicial de anotação e <text:span text:style-name="Emphasis">fine-tuning</text:span>, mas depende de maior capacidade computacional e não fornece, na configuração avaliada, caixas delimitadoras diretamente equivalentes às produzidas pelo detector.</text:p>
      <text:p text:style-name="Text_20_body">A adoção de qualquer abordagem deve incluir revisão humana, registro dos alertas, auditoria das decisões, monitoramento de desempenho e reavaliação diante de mudanças no ambiente urbano. A tecnologia deve apoiar, e não substituir, os processos de planejamento, fiscalização e responsabilização institucional (Zuiderwijk, Chen e Salem, 2021; Mišić, van Est e Kool, 2025).</text:p>
      <text:p text:style-name="Horizontal_20_Line"/>
      <text:h text:style-name="Heading_20_2" text:outline-level="2"><text:soft-page-break/>5. Ameaças à Validade</text:h>
      <text:p text:style-name="Text_20_body">A primeira limitação é o balanceamento artificial do teste. A distribuição de 50% de imagens positivas favorece a comparação controlada, mas não representa necessariamente a prevalência real. Em operação, uma proporção maior de imagens negativas poderia ampliar o impacto absoluto dos falsos positivos.</text:p>
      <text:p text:style-name="Text_20_body">A segunda limitação é a utilização de um único anotador. Embora tenha sido empregado protocolo explícito, casos ambíguos permanecem sujeitos a julgamento individual. Avaliações futuras devem incluir múltiplos anotadores e métricas de concordância.</text:p>
      <text:p text:style-name="Text_20_body">A terceira limitação é a assimetria experimental. O YOLO foi ajustado à tarefa, enquanto o Gemma operou em <text:span text:style-name="Emphasis">zero-shot</text:span>. O estudo compara estratégias de implantação, e não oferece uma comparação arquitetural isolada.</text:p>
      <text:p text:style-name="Text_20_body">A quarta limitação é o possível <text:span text:style-name="Emphasis">domain shift</text:span> entre as bases de treinamento do YOLO e o teste brasileiro. Não foram conduzidos experimentos que isolassem formalmente os efeitos da origem geográfica, da iluminação ou da aparência dos resíduos.</text:p>
      <text:p text:style-name="Text_20_body">A quinta limitação decorre da execução do Gemma em quantização Q5_K_M e via LM Studio. Outra quantização, servidor ou biblioteca pode alterar tanto o desempenho quanto a latência.</text:p>
      <text:p text:style-name="Text_20_body">Além disso, não foram avaliadas múltiplas GPUs, concorrência entre requisições, transmissão por rede, consumo energético, armazenamento, integração com câmeras nem custos monetários. Portanto, os resultados representam viabilidade técnico-experimental inicial, e não uma implantação municipal completa.</text:p>
      <text:p text:style-name="Horizontal_20_Line"/>
      <text:h text:style-name="Heading_20_2" text:outline-level="2">6. Conclusão</text:h>
      <text:p text:style-name="Text_20_body">Este trabalho comparou YOLOv11m e Gemma 3 27B-IT no monitoramento binário de resíduos em 560 imagens reais de vias públicas brasileiras.</text:p>
      <text:p text:style-name="Text_20_body">Em resposta à <text:span text:style-name="Strong_20_Emphasis">RQ1</text:span>, o Gemma apresentou melhor desempenho preditivo. Seu F1-score foi de 0,9238, contra 0,7040 do YOLO, e sua sensibilidade atingiu 0,9964. A superioridade foi estatisticamente significativa segundo o teste de McNemar.</text:p>
      <text:p text:style-name="Text_20_body">Em resposta à <text:span text:style-name="Strong_20_Emphasis">RQ2</text:span>, o YOLO apresentou vantagem expressiva em eficiência. Sua latência média foi de 8,4 ms, contra 1.191,9 ms do Gemma. O detector também fornece caixas delimitadoras, característica relevante para validação visual e sistemas georreferenciados.</text:p>
      <text:p text:style-name="Text_20_body">Os resultados não sustentam a adoção universal de um único modelo. O Gemma é mais adequado a análises pontuais em que a qualidade preditiva prevalece sobre a velocidade. O YOLO é mais apropriado a triagens em larga escala, desde que seja adaptado às condições locais e acompanhado por mecanismos de controle dos erros.</text:p>
      <text:p text:style-name="Text_20_body">Como trabalhos futuros, recomenda-se: ampliar a base com imagens municipais; utilizar múltiplos anotadores; avaliar diferentes proporções de <text:span text:style-name="Emphasis">background</text:span>; repetir o treinamento com múltiplas <text:span text:style-name="Emphasis">seeds</text:span>; testar modelos menores de YOLO e VLMs; comparar custos energéticos; avaliar mudanças de domínio; e implementar um sistema híbrido em que o detector realiza a triagem e o modelo visão-linguagem confirma casos selecionados.</text:p>
      <text:p text:style-name="Horizontal_20_Line"><text:soft-page-break/></text:p>
      <text:h text:style-name="Heading_20_2" text:outline-level="2">Disponibilidade de código e dados</text:h>
      <text:p text:style-name="Text_20_body">Os códigos, configurações e artefatos de reprodução estão organizados no repositório:</text:p>
      <text:p text:style-name="Text_20_body"><text:span text:style-name="Source_20_Text">github.com/jaimejrs/comparativo_yolo_vlm</text:span></text:p>
      <text:p text:style-name="Text_20_body">A disponibilização pública das imagens deverá respeitar as licenças das bases originais, os termos das plataformas de visualização urbana e os procedimentos de anonimização.</text:p>
      <text:p text:style-name="Horizontal_20_Line"/>
      <text:h text:style-name="Heading_20_2" text:outline-level="2">Agradecimentos</text:h>
      <text:p text:style-name="Text_20_body">Os autores agradecem à Universidade Federal do Ceará e aos responsáveis pelas bases públicas utilizadas. <text:span text:style-name="Strong_20_Emphasis">[INSERIR EVENTUAL AGÊNCIA DE FOMENTO, LABORATÓRIO OU APOIO INSTITUCIONAL]</text:span>.</text:p>
      <text:p text:style-name="Horizontal_20_Line"/>
      <text:h text:style-name="Heading_20_2" text:outline-level="2">Referências</text:h>
      <text:p text:style-name="Text_20_body">ABDU, H.; MOHD NOOR, M. H. A survey on waste detection and classification using deep learning. <text:span text:style-name="Emphasis">IEEE Access</text:span>, v. 10, p. 128151–128165, 2022. doi:10.1109/ACCESS.2022.3226682.</text:p>
      <text:p text:style-name="Text_20_body">BRASIL. Lei nº 12.305, de 2 de agosto de 2010. Institui a Política Nacional de Resíduos Sólidos. Brasília, 2010.</text:p>
      <text:p text:style-name="Text_20_body">CÓRDOVA, M. et al. Litter detection with deep learning: a comparative study. <text:span text:style-name="Emphasis">Sensors</text:span>, v. 22, n. 2, artigo 548, 2022. doi:10.3390/s22020548.</text:p>
      <text:p text:style-name="Text_20_body">FOTOVVATIKHAH, F. et al. A systematic review of AI-based techniques for automated waste classification. <text:span text:style-name="Emphasis">Sensors</text:span>, v. 25, n. 10, artigo 3181, 2025. doi:10.3390/s25103181.</text:p>
      <text:p text:style-name="Text_20_body">FUNK, J. et al. A comparative evaluation of vision language models for waste classification in few-shot settings. In: <text:span text:style-name="Emphasis">World Congress on Electrical Engineering and Computer Systems and Science</text:span>, 2025. doi:10.11159/mvml25.113.</text:p>
      <text:p text:style-name="Text_20_body">GEMMA TEAM. <text:span text:style-name="Emphasis">Gemma 3 Technical Report</text:span>. 2025. doi:10.48550/arXiv.2503.19786.</text:p>
      <text:p text:style-name="Text_20_body">KHANAM, R.; HUSSAIN, M. YOLOv11: an overview of the key architectural enhancements. <text:span text:style-name="Emphasis">arXiv</text:span>, 2024. doi:10.48550/arXiv.2410.17725.</text:p>
      <text:p text:style-name="Text_20_body">LI, J. et al. BLIP-2: bootstrapping language-image pre-training with frozen image encoders and large language models. In: <text:span text:style-name="Emphasis">International Conference on Machine Learning</text:span>, 2023. p. 19730–19742.</text:p>
      <text:p text:style-name="Text_20_body">LI, Z. et al. A survey of state-of-the-art large vision-language models: alignment, benchmarks, evaluations and challenges. <text:span text:style-name="Emphasis">arXiv</text:span>, 2025.</text:p>
      <text:p text:style-name="Text_20_body">MAJCHROWSKA, S. et al. Deep learning-based waste detection in natural and urban environments. <text:span text:style-name="Emphasis">Waste Management</text:span>, v. 138, p. 274–284, 2022.</text:p>
      <text:p text:style-name="Text_20_body"><text:soft-page-break/>MALLA, H. J.; BAZLI, M.; ARASHPOUR, M. Prompt-stable knowledge distillation of vision-language models for efficient waste classification in material recovery facilities. <text:span text:style-name="Emphasis">Resources, Conservation and Recycling</text:span>, v. 230, artigo 108885, 2026. doi:10.1016/j.resconrec.2026.108885.</text:p>
      <text:p text:style-name="Text_20_body">MIŠIĆ, J.; VAN EST, R.; KOOL, L. Good governance of public sector AI: a combined value framework for good order and a good society. <text:span text:style-name="Emphasis">AI and Ethics</text:span>, v. 5, p. 4875–4889, 2025. doi:10.1007/s43681-025-00751-3.</text:p>
      <text:p text:style-name="Text_20_body">PROENÇA, P. F.; SIMÕES, P. TACO: Trash Annotations in Context for Litter Detection. <text:span text:style-name="Emphasis">arXiv</text:span>, 2020.</text:p>
      <text:p text:style-name="Text_20_body">RADFORD, A. et al. Learning transferable visual models from natural language supervision. In: <text:span text:style-name="Emphasis">International Conference on Machine Learning</text:span>, 2021. p. 8748–8763.</text:p>
      <text:p text:style-name="Text_20_body">REDMON, J. et al. You only look once: unified, real-time object detection. In: <text:span text:style-name="Emphasis">IEEE Conference on Computer Vision and Pattern Recognition</text:span>, 2016. p. 779–788.</text:p>
      <text:p text:style-name="Text_20_body">RODRIGUES, W.; MAGALHÃES FILHO, L. N. L.; PEREIRA, R. S. Análise dos determinantes dos custos de resíduos sólidos urbanos nas capitais estaduais brasileiras. <text:span text:style-name="Emphasis">urbe. Revista Brasileira de Gestão Urbana</text:span>, v. 8, n. 1, p. 130–141, 2016. doi:10.1590/2175-3369.008.001.AO02.</text:p>
      <text:p text:style-name="Text_20_body">SZELISKI, R. <text:span text:style-name="Emphasis">Computer Vision: Algorithms and Applications</text:span>. 2. ed. Cham: Springer, 2022.</text:p>
      <text:p text:style-name="Text_20_body">TERVEN, J.; CÓRDOVA-ESPARZA, D. M.; ROMERO-GONZÁLEZ, J. A. A comprehensive review of YOLO architectures in computer vision. <text:span text:style-name="Emphasis">Machine Learning and Knowledge Extraction</text:span>, v. 5, n. 4, p. 1680–1716, 2023. doi:10.3390/make5040083.</text:p>
      <text:p text:style-name="Text_20_body">ZHANG, J. et al. Vision-language models for vision tasks: a survey. <text:span text:style-name="Emphasis">arXiv</text:span>, 2024.</text:p>
      <text:p text:style-name="Text_20_body">ZUIDERWIJK, A.; CHEN, Y.-C.; SALEM, F. Implications of the use of artificial intelligence in public governance: a systematic literature review and a research agenda. <text:span text:style-name="Emphasis">Government Information Quarterly</text:span>, v. 38, n. 3, artigo 101577, 2021. doi:10.1016/j.giq.2021.101577.</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3T22:47:09.709460049</meta:creation-date>
    <dc:date>2026-06-13T22:52:33.627738246</dc:date>
    <meta:editing-duration>PT2M46S</meta:editing-duration>
    <meta:editing-cycles>3</meta:editing-cycles>
    <meta:generator>LibreOffice/24.2.7.2$Linux_X86_64 LibreOffice_project/420$Build-2</meta:generator>
    <meta:document-statistic meta:table-count="7" meta:image-count="0" meta:object-count="0" meta:page-count="10" meta:paragraph-count="288" meta:word-count="3485" meta:character-count="24717" meta:non-whitespace-character-count="21525"/>
  </office:meta>
</office:document-meta>
</file>